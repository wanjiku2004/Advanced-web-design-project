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6E704E7F.png" manifest:media-type="image/png"/>
  <manifest:file-entry manifest:full-path="Pictures/100000010000055600000300717602B5.png" manifest:media-type="image/png"/>
  <manifest:file-entry manifest:full-path="Pictures/100000010000055600000300CD07FF5A.png" manifest:media-type="image/png"/>
  <manifest:file-entry manifest:full-path="Pictures/1000000100000556000003008DA8A03F.png" manifest:media-type="image/png"/>
  <manifest:file-entry manifest:full-path="Pictures/10000001000003220000024D8C94260F.png" manifest:media-type="image/png"/>
  <manifest:file-entry manifest:full-path="Pictures/100000010000055600000300FB35D823.png" manifest:media-type="image/png"/>
  <manifest:file-entry manifest:full-path="Pictures/100000010000041A000002EC2B19B6D1.png" manifest:media-type="image/png"/>
  <manifest:file-entry manifest:full-path="Pictures/10000001000003220000024D6F2D0D04.png" manifest:media-type="image/png"/>
  <manifest:file-entry manifest:full-path="Pictures/100000010000055600000300A98354D7.png" manifest:media-type="image/png"/>
  <manifest:file-entry manifest:full-path="Pictures/100000010000055600000300C13814DA.png" manifest:media-type="image/png"/>
  <manifest:file-entry manifest:full-path="Pictures/10000001000005560000030047BFA820.png" manifest:media-type="image/png"/>
  <manifest:file-entry manifest:full-path="Pictures/100000010000041A000002EC45137C2E.png" manifest:media-type="image/png"/>
  <manifest:file-entry manifest:full-path="Pictures/100000010000041A000002EC3451A22D.png" manifest:media-type="image/png"/>
  <manifest:file-entry manifest:full-path="Pictures/10000001000005560000030074F76779.png" manifest:media-type="image/png"/>
  <manifest:file-entry manifest:full-path="Pictures/1000000100000556000003006D0FB4F1.png" manifest:media-type="image/png"/>
  <manifest:file-entry manifest:full-path="Pictures/100000010000055600000300DF106992.png" manifest:media-type="image/png"/>
  <manifest:file-entry manifest:full-path="Pictures/100000010000055600000300FD851314.png" manifest:media-type="image/png"/>
  <manifest:file-entry manifest:full-path="Pictures/100000010000041A000002EC19332870.png" manifest:media-type="image/png"/>
  <manifest:file-entry manifest:full-path="Pictures/100000010000055600000300A8ED60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06f8d4" officeooo:paragraph-rsid="0006f8d4" style:font-weight-asian="bold" style:font-weight-complex="bold"/>
    </style:style>
    <style:style style:name="P2" style:family="paragraph" style:parent-style-name="Standard">
      <style:text-properties officeooo:rsid="0006f8d4" officeooo:paragraph-rsid="0006f8d4"/>
    </style:style>
    <style:style style:name="P3" style:family="paragraph" style:parent-style-name="Standard">
      <style:text-properties style:font-name="Times New Roman" officeooo:rsid="0006f8d4" officeooo:paragraph-rsid="0006f8d4"/>
    </style:style>
    <style:style style:name="P4" style:family="paragraph" style:parent-style-name="Standard">
      <style:text-properties style:font-name="Times New Roman" officeooo:rsid="0008e4c7" officeooo:paragraph-rsid="0008e4c7"/>
    </style:style>
    <style:style style:name="P5" style:family="paragraph" style:parent-style-name="Standard">
      <style:text-properties officeooo:rsid="0008e4c7" officeooo:paragraph-rsid="0008e4c7"/>
    </style:style>
    <style:style style:name="P6" style:family="paragraph" style:parent-style-name="Heading_20_1">
      <style:paragraph-properties fo:break-before="page"/>
      <style:text-properties officeooo:rsid="002682e4" officeooo:paragraph-rsid="002682e4"/>
    </style:style>
    <style:style style:name="P7" style:family="paragraph" style:parent-style-name="Text_20_body">
      <style:text-properties officeooo:rsid="002682e4" officeooo:paragraph-rsid="002682e4"/>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text-properties fo:font-size="14pt" fo:font-weight="bold" officeooo:rsid="000f28cc" officeooo:paragraph-rsid="000f28cc" style:font-size-asian="12.25pt" style:font-weight-asian="bold" style:font-size-complex="14pt" style:font-weight-complex="bold"/>
    </style:style>
    <style:style style:name="P12" style:family="paragraph" style:parent-style-name="Standard">
      <style:text-properties style:font-name="Times New Roman" fo:font-size="12pt" fo:font-weight="normal" officeooo:rsid="000f28cc" officeooo:paragraph-rsid="000f28cc" style:font-size-asian="12pt" style:font-weight-asian="normal" style:font-size-complex="12pt" style:font-weight-complex="normal"/>
    </style:style>
    <style:style style:name="P13" style:family="paragraph" style:parent-style-name="Standard">
      <style:text-properties fo:font-size="14pt" fo:font-weight="normal" officeooo:rsid="000f28cc" officeooo:paragraph-rsid="000f28cc" style:font-size-asian="12.25pt" style:font-weight-asian="normal" style:font-size-complex="14pt" style:font-weight-complex="normal"/>
    </style:style>
    <style:style style:name="P14" style:family="paragraph" style:parent-style-name="Standard">
      <style:text-properties fo:font-weight="normal" officeooo:rsid="000f28cc" officeooo:paragraph-rsid="000f28cc" style:font-weight-asian="normal" style:font-weight-complex="normal"/>
    </style:style>
    <style:style style:name="P15" style:family="paragraph" style:parent-style-name="Standard">
      <style:text-properties fo:font-weight="normal" officeooo:rsid="000fa745" officeooo:paragraph-rsid="000f28cc" style:font-weight-asian="normal" style:font-weight-complex="normal"/>
    </style:style>
    <style:style style:name="P16" style:family="paragraph" style:parent-style-name="Standard">
      <style:text-properties fo:font-weight="normal" officeooo:rsid="000fa745" officeooo:paragraph-rsid="000fa745" style:font-weight-asian="normal" style:font-weight-complex="normal"/>
    </style:style>
    <style:style style:name="P17" style:family="paragraph" style:parent-style-name="Standard" style:list-style-name="List_20_1">
      <style:text-properties style:font-name="Times New Roman" fo:font-weight="normal" officeooo:rsid="000fd7bb" officeooo:paragraph-rsid="000fd7bb" style:font-weight-asian="normal" style:font-weight-complex="normal"/>
    </style:style>
    <style:style style:name="P18" style:family="paragraph" style:parent-style-name="Standard" style:list-style-name="Numbering_20_abc">
      <style:text-properties style:font-name="Times New Roman" fo:font-weight="normal" officeooo:rsid="000fd7bb" officeooo:paragraph-rsid="000fd7bb" style:font-weight-asian="normal" style:font-weight-complex="normal"/>
    </style:style>
    <style:style style:name="P19" style:family="paragraph" style:parent-style-name="Standard" style:list-style-name="Numbering_20_abc">
      <style:text-properties style:font-name="Times New Roman" fo:font-weight="normal" officeooo:rsid="001120fe" officeooo:paragraph-rsid="001120fe" style:font-weight-asian="normal" style:font-weight-complex="normal"/>
    </style:style>
    <style:style style:name="P20" style:family="paragraph" style:parent-style-name="Standard">
      <style:text-properties style:font-name="Times New Roman" fo:font-weight="normal" officeooo:rsid="001120fe" officeooo:paragraph-rsid="001120fe" style:font-weight-asian="normal" style:font-weight-complex="normal"/>
    </style:style>
    <style:style style:name="P21" style:family="paragraph" style:parent-style-name="Standard">
      <style:text-properties fo:font-size="16pt" fo:font-weight="bold" officeooo:rsid="00128913" officeooo:paragraph-rsid="00128913" style:font-size-asian="14pt" style:font-weight-asian="bold" style:font-size-complex="16pt" style:font-weight-complex="bold"/>
    </style:style>
    <style:style style:name="P22" style:family="paragraph" style:parent-style-name="Text_20_body">
      <style:text-properties fo:font-size="14pt" fo:font-weight="normal" officeooo:rsid="0013cd21" style:font-size-asian="12.25pt" style:font-weight-asian="normal" style:font-size-complex="14pt" style:font-weight-complex="normal"/>
    </style:style>
    <style:style style:name="P23" style:family="paragraph" style:parent-style-name="Standard">
      <style:text-properties fo:font-size="14pt" fo:font-weight="normal" officeooo:rsid="0013cd21" officeooo:paragraph-rsid="0013cd21" style:font-size-asian="12.25pt" style:font-weight-asian="normal" style:font-size-complex="14pt" style:font-weight-complex="normal"/>
    </style:style>
    <style:style style:name="P24" style:family="paragraph" style:parent-style-name="Standard">
      <style:text-properties fo:font-size="14pt" fo:font-weight="bold" officeooo:rsid="0014d192" officeooo:paragraph-rsid="0014d192" style:font-size-asian="12.25pt" style:font-weight-asian="bold" style:font-size-complex="14pt" style:font-weight-complex="bold"/>
    </style:style>
    <style:style style:name="P25" style:family="paragraph" style:parent-style-name="Heading_20_2">
      <style:paragraph-properties fo:margin-top="0in" fo:margin-bottom="0in" style:contextual-spacing="false"/>
    </style:style>
    <style:style style:name="P26" style:family="paragraph" style:parent-style-name="Text_20_body" style:list-style-name="List_20_1">
      <style:text-properties fo:font-size="14pt" fo:font-weight="normal" officeooo:rsid="0013cd21" officeooo:paragraph-rsid="0013cd21" style:font-size-asian="12.25pt" style:font-weight-asian="normal" style:font-size-complex="14pt" style:font-weight-complex="normal"/>
    </style:style>
    <style:style style:name="P27" style:family="paragraph" style:parent-style-name="Text_20_body" style:list-style-name="List_20_1">
      <style:text-properties fo:font-size="14pt" officeooo:rsid="0013cd21" style:font-size-asian="12.25pt" style:font-size-complex="14pt"/>
    </style:style>
    <style:style style:name="P28" style:family="paragraph" style:parent-style-name="Standard">
      <style:text-properties style:font-name="Times New Roman" fo:font-size="12pt" fo:font-weight="normal" officeooo:rsid="0016abd7" officeooo:paragraph-rsid="0016abd7" style:font-size-asian="12pt" style:font-weight-asian="normal" style:font-size-complex="12pt" style:font-weight-complex="normal"/>
    </style:style>
    <style:style style:name="P29" style:family="paragraph" style:parent-style-name="Standard">
      <style:text-properties fo:font-size="14pt" fo:font-weight="normal" officeooo:rsid="0016abd7" officeooo:paragraph-rsid="0016abd7" style:font-size-asian="12.25pt" style:font-weight-asian="normal" style:font-size-complex="14pt" style:font-weight-complex="normal"/>
    </style:style>
    <style:style style:name="P30" style:family="paragraph" style:parent-style-name="Standard">
      <style:text-properties fo:font-size="14pt" fo:font-weight="normal" officeooo:rsid="0016d1f8" officeooo:paragraph-rsid="0016d1f8" style:font-size-asian="12.25pt" style:font-weight-asian="normal" style:font-size-complex="14pt" style:font-weight-complex="normal"/>
    </style:style>
    <style:style style:name="P31" style:family="paragraph" style:parent-style-name="Standard" style:list-style-name="List_20_1">
      <style:text-properties style:font-name="Times New Roman" fo:font-size="12pt" fo:font-weight="normal" officeooo:rsid="0016d1f8" officeooo:paragraph-rsid="0016d1f8" style:font-size-asian="12pt" style:font-weight-asian="normal" style:font-size-complex="12pt" style:font-weight-complex="normal"/>
    </style:style>
    <style:style style:name="P32" style:family="paragraph" style:parent-style-name="Standard" style:list-style-name="List_20_1">
      <style:text-properties officeooo:paragraph-rsid="0016d1f8"/>
    </style:style>
    <style:style style:name="P33" style:family="paragraph" style:parent-style-name="Standard">
      <style:text-properties style:font-name="Times New Roman" fo:font-size="12pt" officeooo:paragraph-rsid="0016d1f8" style:font-size-asian="12pt" style:font-size-complex="12pt"/>
    </style:style>
    <style:style style:name="P34" style:family="paragraph" style:parent-style-name="Text_20_body">
      <style:text-properties style:font-name="Times New Roman" fo:font-size="12pt" officeooo:paragraph-rsid="0016d1f8" style:font-size-asian="12pt" style:font-size-complex="12pt"/>
    </style:style>
    <style:style style:name="P35" style:family="paragraph" style:parent-style-name="Text_20_body" style:list-style-name="L1">
      <style:text-properties style:font-name="Times New Roman" fo:font-size="12pt" style:font-size-asian="12pt" style:font-size-complex="12pt"/>
    </style:style>
    <style:style style:name="P36" style:family="paragraph" style:parent-style-name="Standard">
      <style:text-properties fo:font-size="14pt" fo:font-weight="normal" officeooo:rsid="001b26aa" officeooo:paragraph-rsid="001b26aa" style:font-size-asian="12.25pt" style:font-weight-asian="normal" style:font-size-complex="14pt" style:font-weight-complex="normal"/>
    </style:style>
    <style:style style:name="P37" style:family="paragraph" style:parent-style-name="Standard">
      <style:text-properties fo:font-size="14pt" fo:font-weight="normal" officeooo:rsid="001d7b2a" officeooo:paragraph-rsid="001d7b2a" style:font-size-asian="12.25pt" style:font-weight-asian="normal" style:font-size-complex="14pt" style:font-weight-complex="normal"/>
    </style:style>
    <style:style style:name="P38" style:family="paragraph" style:parent-style-name="Text_20_body" style:list-style-name="List_20_1">
      <style:text-properties style:font-name="Times New Roman" fo:font-size="12pt" fo:font-weight="normal" officeooo:rsid="001c1a56" officeooo:paragraph-rsid="001c1a56" style:font-size-asian="12pt" style:font-weight-asian="normal" style:font-size-complex="12pt" style:font-weight-complex="normal"/>
    </style:style>
    <style:style style:name="P39" style:family="paragraph" style:parent-style-name="Text_20_body" style:list-style-name="List_20_1">
      <style:text-properties style:font-name="Times New Roman" fo:font-size="12pt" officeooo:rsid="001c1a56" style:font-size-asian="12pt" style:font-size-complex="12pt"/>
    </style:style>
    <style:style style:name="P40" style:family="paragraph" style:parent-style-name="Text_20_body" style:list-style-name="List_20_1">
      <style:text-properties style:font-name="Times New Roman" fo:font-size="12pt" officeooo:paragraph-rsid="001d7b2a" style:font-size-asian="12pt" style:font-size-complex="12pt"/>
    </style:style>
    <style:style style:name="P41" style:family="paragraph" style:parent-style-name="Text_20_body" style:list-style-name="List_20_1">
      <style:text-properties fo:font-size="14pt" officeooo:paragraph-rsid="001d7b2a" style:font-size-asian="14pt" style:font-size-complex="14pt"/>
    </style:style>
    <style:style style:name="P42" style:family="paragraph" style:parent-style-name="Text_20_body" style:list-style-name="List_20_1">
      <style:text-properties fo:font-size="14pt" fo:font-weight="normal" officeooo:rsid="001d7b2a" officeooo:paragraph-rsid="001d7b2a" style:font-size-asian="12.25pt" style:font-weight-asian="normal" style:font-size-complex="14pt" style:font-weight-complex="normal"/>
    </style:style>
    <style:style style:name="P43" style:family="paragraph" style:parent-style-name="Text_20_body">
      <style:text-properties fo:font-size="14pt" fo:font-weight="normal" officeooo:rsid="001d7b2a" officeooo:paragraph-rsid="001d7b2a" style:font-size-asian="12.25pt" style:font-weight-asian="normal" style:font-size-complex="14pt" style:font-weight-complex="normal"/>
    </style:style>
    <style:style style:name="P44" style:family="paragraph" style:parent-style-name="Text_20_body">
      <style:text-properties fo:font-size="14pt" fo:font-weight="normal" officeooo:rsid="001dfbd2" officeooo:paragraph-rsid="001d7b2a" style:font-size-asian="12.25pt" style:font-weight-asian="normal" style:font-size-complex="14pt" style:font-weight-complex="normal"/>
    </style:style>
    <style:style style:name="P45" style:family="paragraph" style:parent-style-name="Text_20_body">
      <style:text-properties fo:font-size="14pt" fo:font-weight="normal" officeooo:rsid="001fc847" officeooo:paragraph-rsid="001dfbd2" style:font-size-asian="12.25pt" style:font-weight-asian="normal" style:font-size-complex="14pt" style:font-weight-complex="normal"/>
    </style:style>
    <style:style style:name="P46" style:family="paragraph" style:parent-style-name="Text_20_body">
      <style:text-properties fo:font-size="14pt" fo:font-weight="bold" officeooo:rsid="001fc847" officeooo:paragraph-rsid="001fc847" style:font-size-asian="12.25pt" style:font-weight-asian="bold" style:font-size-complex="14pt" style:font-weight-complex="bold"/>
    </style:style>
    <style:style style:name="P47" style:family="paragraph" style:parent-style-name="Text_20_body" style:list-style-name="List_20_1">
      <style:text-properties style:font-name="Times New Roman" fo:font-size="12pt" officeooo:paragraph-rsid="001fc847" style:font-size-asian="12pt" style:font-size-complex="12pt"/>
    </style:style>
    <style:style style:name="P48" style:family="paragraph" style:parent-style-name="Text_20_body" style:list-style-name="List_20_1">
      <style:text-properties style:font-name="Times New Roman" fo:font-size="12pt" officeooo:paragraph-rsid="0020169a" style:font-size-asian="12pt" style:font-size-complex="12pt"/>
    </style:style>
    <style:style style:name="P49" style:family="paragraph" style:parent-style-name="Text_20_body">
      <style:text-properties style:font-name="Times New Roman" fo:font-size="12pt" fo:font-weight="normal" officeooo:rsid="001fc847" officeooo:paragraph-rsid="001fc847" style:font-size-asian="12pt" style:font-weight-asian="normal" style:font-size-complex="12pt" style:font-weight-complex="normal"/>
    </style:style>
    <style:style style:name="T1" style:family="text">
      <style:text-properties officeooo:rsid="0008e4c7"/>
    </style:style>
    <style:style style:name="T2" style:family="text">
      <style:text-properties style:font-name="Times New Roman"/>
    </style:style>
    <style:style style:name="T3" style:family="text">
      <style:text-properties style:font-name="Times New Roman" officeooo:rsid="000f1e7d"/>
    </style:style>
    <style:style style:name="T4" style:family="text">
      <style:text-properties style:font-name="Times New Roman" officeooo:rsid="002682e4"/>
    </style:style>
    <style:style style:name="T5" style:family="text">
      <style:text-properties officeooo:rsid="00272c7c"/>
    </style:style>
    <style:style style:name="T6" style:family="text">
      <style:text-properties style:font-name="Times New Roman" fo:font-size="12pt" style:font-size-asian="12pt" style:font-size-complex="12pt"/>
    </style:style>
    <style:style style:name="T7" style:family="text">
      <style:text-properties officeooo:rsid="00277143"/>
    </style:style>
    <style:style style:name="T8" style:family="text">
      <style:text-properties style:font-name="Times New Roman" fo:font-size="12pt" fo:font-weight="normal" officeooo:rsid="0016d1f8" style:font-size-asian="12pt" style:font-weight-asian="normal" style:font-size-complex="12pt" style:font-weight-complex="normal"/>
    </style:style>
    <style:style style:name="T9" style:family="text">
      <style:text-properties style:font-name="Times New Roman" fo:font-size="12pt" fo:font-weight="normal" officeooo:rsid="00277143"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bold"/>
    </style:style>
    <style:style style:name="T13" style:family="text">
      <style:text-properties fo:font-weight="normal" officeooo:rsid="00277143" style:font-weight-asian="normal" style:font-weight-complex="normal"/>
    </style:style>
    <style:style style:name="T14" style:family="text">
      <style:text-properties officeooo:rsid="00256f18"/>
    </style:style>
    <style:style style:name="T15" style:family="text">
      <style:text-properties fo:font-weight="normal" officeooo:rsid="001fc847" style:font-weight-asian="normal" style:font-weight-complex="normal"/>
    </style:style>
    <style:style style:name="T16" style:family="text">
      <style:text-properties officeooo:rsid="001fc847"/>
    </style:style>
    <style:style style:name="T17" style:family="text">
      <style:text-properties officeooo:rsid="0020169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Inline_20_Heading">
      <style:graphic-properties style:vertical-pos="middle" style:vertical-rel="text"/>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CILLA WANJIKU</text:p>
      <text:p text:style-name="P1">BBIT/2023/72533</text:p>
      <text:p text:style-name="P1">BACHELOR OF BUSINESS AND INFORMATION TECHNOLOGY</text:p>
      <text:p text:style-name="P1">BIT3208</text:p>
      <text:p text:style-name="P1">ADVANCED WEB DESIGN AND DEVELOPMENT</text:p>
      <text:p text:style-name="P1">MR. MICHAEL NYORO</text:p>
      <text:p text:style-name="P1">MAY/AUGUST 2026</text:p>
      <text:p text:style-name="P2"/>
      <text:p text:style-name="P3">K<text:span text:style-name="T1">ikapu Mart Ecommerce Website</text:span></text:p>
      <text:p text:style-name="P4">Selected technologies- HTML, CSS, Javascript,PHP+MySQL</text:p>
      <text:p text:style-name="P5"><text:a xlink:type="simple" xlink:href="https://github.com/wanjiku2004/Advanced-web-design-project" text:style-name="Internet_20_link" text:visited-style-name="Visited_20_Internet_20_Link"><text:span text:style-name="T2">https://github.com/wanjiku2004/Advanced-web-design-project</text:span></text:a><text:span text:style-name="T2"> </text:span><text:span text:style-name="T3">GitHub repository lin</text:span><text:span text:style-name="T4">k </text:span></text:p>
      <text:h text:style-name="P6" text:outline-level="1"><text:bookmark-start text:name="__RefHeading___Toc908_4282474363"/>Table of Contents<text:bookmark-end text:name="__RefHeading___Toc908_4282474363"/></text:h>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8"><text:a xlink:type="simple" xlink:href="#__RefHeading___Toc908_4282474363" text:style-name="Index_20_Link" text:visited-style-name="Index_20_Link">Table of Contents<text:tab/>2</text:a></text:p>
          <text:p text:style-name="P8"><text:a xlink:type="simple" xlink:href="#__RefHeading___Toc941_4282474363" text:style-name="Index_20_Link" text:visited-style-name="Index_20_Link">Week 1: Local Environment Setup<text:tab/>3</text:a></text:p>
          <text:p text:style-name="P9"><text:a xlink:type="simple" xlink:href="#__RefHeading___Toc943_4282474363" text:style-name="Index_20_Link" text:visited-style-name="Index_20_Link">Title<text:tab/>3</text:a></text:p>
          <text:p text:style-name="P9"><text:a xlink:type="simple" xlink:href="#__RefHeading___Toc945_4282474363" text:style-name="Index_20_Link" text:visited-style-name="Index_20_Link">Required Evidence<text:tab/>3</text:a></text:p>
          <text:p text:style-name="P9"><text:a xlink:type="simple" xlink:href="#__RefHeading___Toc947_4282474363" text:style-name="Index_20_Link" text:visited-style-name="Index_20_Link">Reflection<text:tab/>5</text:a></text:p>
          <text:p text:style-name="P8"><text:a xlink:type="simple" xlink:href="#__RefHeading___Toc949_4282474363" text:style-name="Index_20_Link" text:visited-style-name="Index_20_Link">Week 2: Wireframe and GUI Design<text:tab/>6</text:a></text:p>
          <text:p text:style-name="P9"><text:a xlink:type="simple" xlink:href="#__RefHeading___Toc939_4282474363" text:style-name="Index_20_Link" text:visited-style-name="Index_20_Link">Reflection<text:tab/>6</text:a></text:p>
          <text:p text:style-name="P8"><text:a xlink:type="simple" xlink:href="#__RefHeading___Toc951_4282474363" text:style-name="Index_20_Link" text:visited-style-name="Index_20_Link">Week 3: JavaScript and PHP Basics<text:tab/>8</text:a></text:p>
          <text:p text:style-name="P9"><text:a xlink:type="simple" xlink:href="#__RefHeading___Toc1666_4282474363" text:style-name="Index_20_Link" text:visited-style-name="Index_20_Link">Title<text:tab/>8</text:a></text:p>
          <text:p text:style-name="P9"><text:a xlink:type="simple" xlink:href="#__RefHeading___Toc1668_4282474363" text:style-name="Index_20_Link" text:visited-style-name="Index_20_Link">Reflection:<text:tab/>9</text:a></text:p>
          <text:p text:style-name="P8"><text:a xlink:type="simple" xlink:href="#__RefHeading___Toc1670_4282474363" text:style-name="Index_20_Link" text:visited-style-name="Index_20_Link">Week 4: Introduce Dynamic Backend Processing and Real User Interaction Systems<text:tab/>10</text:a></text:p>
          <text:p text:style-name="P9"><text:a xlink:type="simple" xlink:href="#__RefHeading___Toc1672_4282474363" text:style-name="Index_20_Link" text:visited-style-name="Index_20_Link">Reflection:<text:tab/>12</text:a></text:p>
          <text:p text:style-name="P8"><text:a xlink:type="simple" xlink:href="#__RefHeading___Toc1674_4282474363" text:style-name="Index_20_Link" text:visited-style-name="Index_20_Link">Week 5: Building Data-Driven Systems Using Databases<text:tab/>13</text:a></text:p>
          <text:p text:style-name="P9"><text:a xlink:type="simple" xlink:href="#__RefHeading___Toc1676_4282474363" text:style-name="Index_20_Link" text:visited-style-name="Index_20_Link">CRUD Operations and SQL Query<text:tab/>13</text:a></text:p>
        </text:index-body>
      </text:table-of-content>
      <text:p text:style-name="P5"/>
      <text:p text:style-name="P2"/>
      <text:p text:style-name="P2"/>
      <text:p text:style-name="P2">-<text:span text:style-name="T5">8+</text:span></text:p>
      <text:h text:style-name="P10" text:outline-level="1"><text:bookmark-start text:name="__RefHeading___Toc941_4282474363"/><text:span text:style-name="T5">W</text:span>eek 1: Local Environment Setup<text:bookmark-end text:name="__RefHeading___Toc941_4282474363"/></text:h>
      <text:p text:style-name="P11"/>
      <text:h text:style-name="Heading_20_2" text:outline-level="2"><text:bookmark-start text:name="__RefHeading___Toc943_4282474363"/>Title<text:bookmark-end text:name="__RefHeading___Toc943_4282474363"/></text:h>
      <text:p text:style-name="P12">Installation and Testing of Local Development Environment</text:p>
      <text:p text:style-name="P12"/>
      <text:p text:style-name="P12"/>
      <text:h text:style-name="Heading_20_2" text:outline-level="2"><text:bookmark-start text:name="__RefHeading___Toc945_4282474363"/>Required Evidence<text:bookmark-end text:name="__RefHeading___Toc945_4282474363"/></text:h>
      <text:p text:style-name="P13"><draw:frame draw:style-name="fr1" draw:name="Frame2" text:anchor-type="char" svg:width="4.1709in" draw:z-index="0"><draw:text-box fo:min-height="3.0638in"><text:p text:style-name="Figure"><draw:frame draw:style-name="fr2" draw:name="Image1" text:anchor-type="paragraph" svg:width="4.1709in" style:rel-width="100%" svg:height="3.0638in" style:rel-height="scale" draw:z-index="1"><draw:image xlink:href="Pictures/10000001000003220000024D8C94260F.png" xlink:type="simple" xlink:show="embed" xlink:actuate="onLoad" draw:mime-type="image/png"/></draw:frame>Figure <text:sequence text:ref-name="refFigure0" text:name="Figure" text:formula="ooow:Figure+1" style:num-format="1">1</text:sequence>: Installation of Xampp</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3" text:anchor-type="char" svg:x="1.0492in" svg:y="0.1744in" svg:width="4.2925in" draw:z-index="2"><draw:text-box fo:min-height="3.152in"><text:p text:style-name="Figure"><draw:frame draw:style-name="fr2" draw:name="Image2" text:anchor-type="paragraph" svg:width="4.2925in" style:rel-width="100%" svg:height="3.152in" style:rel-height="scale" draw:z-index="3"><draw:image xlink:href="Pictures/10000001000003220000024D6F2D0D04.png" xlink:type="simple" xlink:show="embed" xlink:actuate="onLoad" draw:mime-type="image/png"/></draw:frame>Figure <text:sequence text:ref-name="refFigure1" text:name="Figure" text:formula="ooow:Figure+1" style:num-format="1">2</text:sequence>: Apache and MySQL Running</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draw:frame draw:style-name="fr1" draw:name="Frame4" text:anchor-type="char" svg:width="4.3472in" draw:z-index="4"><draw:text-box fo:min-height="3.0965in"><text:p text:style-name="Figure"><draw:frame draw:style-name="fr4" draw:name="Image3" text:anchor-type="paragraph" svg:x="-0.052in" svg:y="-1.448in" svg:width="4.3472in" style:rel-width="100%" svg:height="3.0965in" style:rel-height="scale" draw:z-index="5"><draw:image xlink:href="Pictures/100000010000041A000002EC45137C2E.png" xlink:type="simple" xlink:show="embed" xlink:actuate="onLoad" draw:mime-type="image/png"/></draw:frame>Figure <text:sequence text:ref-name="refFigure2" text:name="Figure" text:formula="ooow:Figure+1" style:num-format="1">3</text:sequence>: Localhost Test Page</text:p></draw:text-box></draw:frame><text:s text:c="16"/></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5" text:anchor-type="char" svg:x="1.3374in" svg:y="0.1126in" svg:width="4.789in" draw:z-index="6"><draw:text-box fo:min-height="3.411in"><text:p text:style-name="Figure"><draw:frame draw:style-name="fr4" draw:name="Image4" text:anchor-type="paragraph" svg:x="-0.3752in" svg:y="-1.3957in" svg:width="4.789in" style:rel-width="100%" svg:height="3.411in" style:rel-height="scale" draw:z-index="7"><draw:image xlink:href="Pictures/100000010000041A000002EC2B19B6D1.png" xlink:type="simple" xlink:show="embed" xlink:actuate="onLoad" draw:mime-type="image/png"/></draw:frame>Figure <text:sequence text:ref-name="refFigure3" text:name="Figure" text:formula="ooow:Figure+1" style:num-format="1">4</text:sequence>: Hello World Test</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raw:frame draw:style-name="fr3" draw:name="Frame6" text:anchor-type="char" svg:x="1.289in" svg:y="0.0583in" svg:width="4.3717in" draw:z-index="8"><draw:text-box fo:min-height="3.1138in"><text:p text:style-name="Figure"><draw:frame draw:style-name="fr2" draw:name="Image5" text:anchor-type="paragraph" svg:width="4.3717in" style:rel-width="100%" svg:height="3.1138in" style:rel-height="scale" draw:z-index="9"><draw:image xlink:href="Pictures/100000010000041A000002EC3451A22D.png" xlink:type="simple" xlink:show="embed" xlink:actuate="onLoad" draw:mime-type="image/png"/></draw:frame>Figure <text:sequence text:ref-name="refFigure4" text:name="Figure" text:formula="ooow:Figure+1" style:num-format="1">5</text:sequence>: Database Connection Tes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h text:style-name="Heading_20_2" text:outline-level="2"><text:bookmark-start text:name="__RefHeading___Toc947_4282474363"/>Reflection<text:bookmark-end text:name="__RefHeading___Toc947_4282474363"/></text:h>
      <text:list xml:id="list213672789" text:style-name="List_20_1">
        <text:list-item>
          <text:p text:style-name="P17">I have learned how to install Xampp and run Apache and MySQL. I also learned how to run a localhost test page, a html page and how to do a successful database connection.</text:p>
        </text:list-item>
        <text:list-item>
          <text:p text:style-name="P17">The technologies I used were html and MySQL+PHP</text:p>
        </text:list-item>
        <text:list-item>
          <text:p text:style-name="P17">I encountered a challenge in disabling apache2 but I was able to do so and enable apache</text:p>
        </text:list-item>
        <text:list-item>
          <text:p text:style-name="P17">Screenshots:</text:p>
        </text:list-item>
      </text:list>
      <text:list text:style-name="Numbering_20_abc">
        <text:list-item>
          <text:p text:style-name="P18">Fig.1 shows that Xampp was installed successfully in my computer</text:p>
        </text:list-item>
        <text:list-item>
          <text:p text:style-name="P19">Fig.2 shows that apache and MySQL were running successfully after installation of Xampp</text:p>
        </text:list-item>
        <text:list-item>
          <text:p text:style-name="P19">Fig.3 shows the browser running localhost. This explains that apache was working.</text:p>
        </text:list-item>
        <text:list-item>
          <text:p text:style-name="P19">Fig.4 shows that “Hello World” was displayed on the browser after using html to write the code.</text:p>
        </text:list-item>
        <text:list-item>
          <text:p text:style-name="P19">Fig.5 shows successful connection between PHP and MySQL using mysql_connect(). This confirmed that apache and MySQL services were properly configured in Xampp.</text:p>
        </text:list-item>
      </text:list>
      <text:p text:style-name="P20"/>
      <text:p text:style-name="P21"/>
      <text:h text:style-name="P10" text:outline-level="1"><text:bookmark-start text:name="__RefHeading___Toc949_4282474363"/>Week 2: Wireframe and GUI Design<text:bookmark-end text:name="__RefHeading___Toc949_4282474363"/></text:h>
      <text:p text:style-name="P22"/>
      <text:p text:style-name="P23"><draw:frame draw:style-name="fr3" draw:name="Frame7" text:anchor-type="char" svg:x="-0.0654in" svg:y="0.1665in" svg:width="6.2791in" draw:z-index="10"><draw:text-box fo:min-height="3.7626in"><text:p text:style-name="Figure"><draw:frame draw:style-name="fr2" draw:name="Image6" text:anchor-type="paragraph" svg:width="6.2791in" style:rel-width="100%" svg:height="3.7626in" style:rel-height="scale" draw:z-index="11"><draw:image xlink:href="Pictures/10000001000005560000030074F76779.png" xlink:type="simple" xlink:show="embed" xlink:actuate="onLoad" draw:mime-type="image/png"/></draw:frame>Figure <text:sequence text:ref-name="refFigure5" text:name="Figure" text:formula="ooow:Figure+1" style:num-format="1">6</text:sequence>: Wireframe and GUI Design</text:p></draw:text-box></draw:frame><text:s text:c="2"/></text:p>
      <text:p text:style-name="P24"><draw:frame draw:style-name="fr5" draw:name="Frame1" text:anchor-type="as-char" draw:z-index="40"><draw:text-box fo:min-height="0in" fo:min-width="0in"><text:h text:style-name="P25" text:outline-level="2"><text:bookmark-start text:name="__RefHeading___Toc939_4282474363"/>Reflection<text:bookmark-end text:name="__RefHeading___Toc939_4282474363"/></text:h></draw:text-box></draw:frame></text:p>
      <text:list text:continue-list="list213672789" text:style-name="List_20_1">
        <text:list-item>
          <text:p text:style-name="P26"><text:span text:style-name="Strong_20_Emphasis"><text:span text:style-name="T6">Why the design was selected:</text:span></text:span><text:span text:style-name="T6"><text:line-break/>The design was selected because it provides a simple, organized, and user-friendly e-commerce layout. It highlights key features such as product categories, featured products, search functionality, shopping cart, wishlist, and user accounts, making online shopping efficient and accessible.</text:span></text:p>
        </text:list-item>
        <text:list-item>
          <text:p text:style-name="P27"><text:span text:style-name="Strong_20_Emphasis"><text:span text:style-name="T6">User Experience Considerations:</text:span></text:span><text:span text:style-name="T6"><text:line-break/>The interface uses a clear structure, visible product categories, quick-access icons, and call-to-action buttons to reduce user effort and improve usability.</text:span></text:p>
        </text:list-item>
        <text:list-item>
          <text:p text:style-name="P27"><text:span text:style-name="Strong_20_Emphasis"><text:span text:style-name="T6">Navigation Flow Planning:</text:span></text:span><text:span text:style-name="T6"><text:line-break/>Users can search for products, browse categories, view featured items, add products to the cart or wishlist, and manage their accounts through a logical top-to-bottom navigation flow.</text:span></text:p>
        </text:list-item>
        <text:list-item>
          <text:p text:style-name="P27"><text:span text:style-name="Strong_20_Emphasis"><text:span text:style-name="T6">Intended System Users:</text:span></text:span><text:span text:style-name="T6"><text:line-break/>Online shoppers, retail customers, store administrators, and product managers using Kikapu Mart for purchasing and managing products.</text:span></text:p>
        </text:list-item>
      </text:list>
      <text:h text:style-name="P10" text:outline-level="1"><text:bookmark-start text:name="__RefHeading___Toc951_4282474363"/>Week 3: JavaScript and PHP Basics<text:bookmark-end text:name="__RefHeading___Toc951_4282474363"/></text:h>
      <text:h text:style-name="Heading_20_2" text:outline-level="2"><text:bookmark-start text:name="__RefHeading___Toc1666_4282474363"/>Title <text:bookmark-end text:name="__RefHeading___Toc1666_4282474363"/></text:h>
      <text:p text:style-name="P28">Frontend Interaction and Backend Foundations</text:p>
      <text:p text:style-name="P29"/>
      <text:p text:style-name="P29"/>
      <text:p text:style-name="P29"><draw:frame draw:style-name="fr1" draw:name="Frame8" text:anchor-type="char" svg:width="6.6929in" draw:z-index="12"><draw:text-box fo:min-height="3.7626in"><text:p text:style-name="Figure"><draw:frame draw:style-name="fr2" draw:name="Image7" text:anchor-type="paragraph" svg:width="6.6929in" style:rel-width="100%" svg:height="3.7626in" style:rel-height="scale" draw:z-index="13"><draw:image xlink:href="Pictures/100000010000055600000300DF106992.png" xlink:type="simple" xlink:show="embed" xlink:actuate="onLoad" draw:mime-type="image/png"/></draw:frame>Figure <text:sequence text:ref-name="refFigure6" text:name="Figure" text:formula="ooow:Figure+1" style:num-format="1">7</text:sequence>: JavaScript Form Validation</text:p></draw:text-box></draw:frame><draw:frame draw:style-name="fr3" draw:name="Frame9" text:anchor-type="char" svg:x="-0.1772in" svg:y="5.7327in" svg:width="6.6929in" draw:z-index="14"><draw:text-box fo:min-height="4.7673in"><text:p text:style-name="Figure"><draw:frame draw:style-name="fr2" draw:name="Image8" text:anchor-type="paragraph" svg:width="6.6929in" style:rel-width="100%" svg:height="4.7673in" style:rel-height="scale" draw:z-index="15"><draw:image xlink:href="Pictures/100000010000041A000002EC3451A22D.png" xlink:type="simple" xlink:show="embed" xlink:actuate="onLoad" draw:mime-type="image/png"/></draw:frame>Figure <text:sequence text:ref-name="refFigure7" text:name="Figure" text:formula="ooow:Figure+1" style:num-format="1">8</text:sequence>: Database Connection</text:p></draw:text-box></draw:frame></text:p>
      <text:p text:style-name="P30"><text:soft-page-break/></text:p>
      <text:h text:style-name="Heading_20_2" text:outline-level="2"><text:bookmark-start text:name="__RefHeading___Toc1668_4282474363"/><draw:frame draw:style-name="fr1" draw:name="Frame10" text:anchor-type="char" svg:width="6.6929in" draw:z-index="16"><draw:text-box fo:min-height="3.7626in"><text:p text:style-name="Figure"><draw:frame draw:style-name="fr2" draw:name="Image9" text:anchor-type="paragraph" svg:width="6.6929in" style:rel-width="100%" svg:height="3.7626in" style:rel-height="scale" draw:z-index="17"><draw:image xlink:href="Pictures/1000000100000556000003006D0FB4F1.png" xlink:type="simple" xlink:show="embed" xlink:actuate="onLoad" draw:mime-type="image/png"/></draw:frame>Figure <text:sequence text:ref-name="refFigure8" text:name="Figure" text:formula="ooow:Figure+1" style:num-format="1">9</text:sequence>: Dynamic User Input Handling</text:p></draw:text-box></draw:frame>Reflection:<text:bookmark-end text:name="__RefHeading___Toc1668_4282474363"/></text:h>
      <text:list xml:id="list122915371427185" text:continue-numbering="true" text:style-name="List_20_1">
        <text:list-item>
          <text:p text:style-name="P31">Fig.<text:span text:style-name="T7">7</text:span> shows a form validation system created by javascript with a strength password checker</text:p>
        </text:list-item>
        <text:list-item>
          <text:p text:style-name="P31">Fig.<text:span text:style-name="T7">8</text:span> shows a successful database connection. This explains that the apache and MySQL were working after PHP syntax practice.</text:p>
        </text:list-item>
        <text:list-item>
          <text:p text:style-name="P32"><text:span text:style-name="T8">Fig.</text:span><text:span text:style-name="T9">9:</text:span><text:span text:style-name="T6">This image shows the</text:span><text:span text:style-name="T10"> </text:span><text:span text:style-name="Strong_20_Emphasis"><text:span text:style-name="T10">homepage navigation interface of the Kikapu Mart e-commerce system</text:span></text:span><text:span text:style-name="T10">. </text:span><text:span text:style-name="T6">The layout is designed to provide users with quick access to products, promotions, and shopping features while maintaining a clean and user-friendly experience.</text:span></text:p>
        </text:list-item>
      </text:list>
      <text:p text:style-name="P33"/>
      <text:p text:style-name="P34">Frontend interfaces (like the <text:span text:style-name="T11">Kikapu Mart</text:span><text:span text:style-name="T11"> </text:span>menu and registration form) collect user data and send requests to the backend server via HTTP. The backend processes this logic and talks to the database to store or fetch information, sending the results back to the frontend.</text:p>
      <text:list text:style-name="L1">
        <text:list-item>
          <text:p text:style-name="P35"><text:span text:style-name="T12">Validation Purpose:</text:span> Frontend validation provides instant feedback, catching user errors (like mismatched passwords) before submission to improve UX and reduce server load.</text:p>
        </text:list-item>
        <text:list-item>
          <text:p text:style-name="P35"><text:span text:style-name="T12">Database Connection:</text:span> Essential for data persistence, allowing the backend to securely store registered users or dynamically retrieve products.</text:p>
        </text:list-item>
        <text:list-item>
          <text:p text:style-name="P35"><text:span text:style-name="T12">Technologies:</text:span> HTML/CSS (UI structure), JavaScript (validation), PHP (backend logic), and MySQL (database).</text:p>
        </text:list-item>
      </text:list>
      <text:p text:style-name="P33"/>
      <text:h text:style-name="Heading_20_1" text:outline-level="1"><text:bookmark-start text:name="__RefHeading___Toc1670_4282474363"/><text:soft-page-break/>Week 4: Introduce Dynamic Backend Processing and Real User Interaction Systems<text:bookmark-end text:name="__RefHeading___Toc1670_4282474363"/></text:h>
      <text:p text:style-name="P36"><draw:frame draw:style-name="fr3" draw:name="Frame11" text:anchor-type="char" svg:x="0.8846in" svg:y="0.552in" svg:width="5.0075in" draw:z-index="18"><draw:text-box fo:min-height="2.8154in"><text:p text:style-name="Figure"><draw:frame draw:style-name="fr2" draw:name="Image10" text:anchor-type="paragraph" svg:width="5.0075in" style:rel-width="100%" svg:height="2.8154in" style:rel-height="scale" draw:z-index="19"><draw:image xlink:href="Pictures/100000010000055600000300A98354D7.png" xlink:type="simple" xlink:show="embed" xlink:actuate="onLoad" draw:mime-type="image/png"/></draw:frame>Figure <text:sequence text:ref-name="refFigure9" text:name="Figure" text:formula="ooow:Figure+1" style:num-format="1">10</text:sequence>: Login Form</text:p></draw:text-box></draw:frame></text:p>
      <text:p text:style-name="P36"><text:s text:c="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3" draw:name="Frame12" text:anchor-type="char" svg:x="0.9598in" svg:y="0.5209in" svg:width="5.7909in" draw:z-index="20"><draw:text-box fo:min-height="3.2555in"><text:p text:style-name="Figure"><draw:frame draw:style-name="fr2" draw:name="Image11" text:anchor-type="paragraph" svg:width="5.7909in" style:rel-width="100%" svg:height="3.2555in" style:rel-height="scale" draw:z-index="21"><draw:image xlink:href="Pictures/10000001000005560000030047BFA820.png" xlink:type="simple" xlink:show="embed" xlink:actuate="onLoad" draw:mime-type="image/png"/></draw:frame>Figure <text:sequence text:ref-name="refFigure10" text:name="Figure" text:formula="ooow:Figure+1" style:num-format="1">11</text:sequence>: PHP Processing</text:p></draw:text-box></draw:frame></text:p>
      <text:p text:style-name="P36"><text:s text:c="3"/></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 text:c="2"/></text:p>
      <text:p text:style-name="P36"/>
      <text:p text:style-name="P36"><text:soft-page-break/></text:p>
      <text:p text:style-name="P36"/>
      <text:p text:style-name="P36"/>
      <text:p text:style-name="P36"><draw:frame draw:style-name="fr6" draw:name="Frame13" text:anchor-type="char" svg:x="0.8957in" svg:y="0.0799in" svg:width="6.089in" draw:z-index="22"><draw:text-box fo:min-height="3.4228in"><text:p text:style-name="Figure"><draw:frame draw:style-name="fr2" draw:name="Image12" text:anchor-type="paragraph" svg:width="6.089in" style:rel-width="100%" svg:height="3.4228in" style:rel-height="scale" draw:z-index="23"><draw:image xlink:href="Pictures/100000010000055600000300FD851314.png" xlink:type="simple" xlink:show="embed" xlink:actuate="onLoad" draw:mime-type="image/png"/></draw:frame>Figure <text:sequence text:ref-name="refFigure11" text:name="Figure" text:formula="ooow:Figure+1" style:num-format="1">12</text:sequence>: Folder Structur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draw:frame draw:style-name="fr7" draw:name="Frame14" text:anchor-type="char" svg:width="6.6929in" draw:z-index="38"><draw:text-box fo:min-height="4.7673in"><text:p text:style-name="Figure"><draw:frame draw:style-name="fr2" draw:name="Image13" text:anchor-type="paragraph" svg:width="6.6929in" style:rel-width="100%" svg:height="4.7673in" style:rel-height="scale" draw:z-index="39"><draw:image xlink:href="Pictures/100000010000041A000002EC19332870.png" xlink:type="simple" xlink:show="embed" xlink:actuate="onLoad" draw:mime-type="image/png"/></draw:frame>Figure <text:sequence text:ref-name="refFigure12" text:name="Figure" text:formula="ooow:Figure+1" style:num-format="1">13</text:sequence>: Database Connection</text:p></draw:text-box></draw:frame><text:soft-page-break/></text:p>
      <text:p text:style-name="P37"/>
      <text:p text:style-name="P37"/>
      <text:p text:style-name="P37"/>
      <text:h text:style-name="Heading_20_2" text:outline-level="2"><text:bookmark-start text:name="__RefHeading___Toc1672_4282474363"/>Reflection:<text:bookmark-end text:name="__RefHeading___Toc1672_4282474363"/></text:h>
      <text:list text:continue-list="list122915371427185" text:style-name="List_20_1">
        <text:list-item>
          <text:p text:style-name="P38">Fig.1<text:span text:style-name="T7">0</text:span>: Represents the frontend user interface for Kikapu Mart capturing inputs like email/phone and password to authenticate returning users.</text:p>
        </text:list-item>
        <text:list-item>
          <text:p text:style-name="P39"><text:span text:style-name="T11">Fig.</text:span><text:span text:style-name="T13">11</text:span>: Demonstrates backend execution, handling server-side form validation, displaying conditional errors, echoing submitted data safely, or logging the transaction to a local file system.</text:p>
        </text:list-item>
        <text:list-item>
          <text:p text:style-name="P39"><text:span text:style-name="T11">Fig.</text:span><text:span text:style-name="T13">12</text:span>: Displays the full project asset directory within the Linux Dolphin file manager.</text:p>
        </text:list-item>
        <text:list-item>
          <text:p text:style-name="P40"><text:span text:style-name="T14">Fig.</text:span><text:span text:style-name="T7">13:</text:span><text:span text:style-name="T14"> It </text:span>displays the successfully <text:span text:style-name="T14">created</text:span> homepage of Kikapu Mart, an e-commerce website built using PHP, HTML, CSS, and JavaScript, running on a local XAMPP server.</text:p>
          <text:p text:style-name="P41"/>
        </text:list-item>
      </text:list>
      <text:h text:style-name="Heading_20_1" text:outline-level="1"><text:bookmark-start text:name="__RefHeading___Toc1674_4282474363"/><text:soft-page-break/>Week 5: Building Data-Driven Systems Using Databases<text:bookmark-end text:name="__RefHeading___Toc1674_4282474363"/></text:h>
      <text:list text:continue-numbering="true" text:style-name="List_20_1">
        <text:list-header>
          <text:p text:style-name="P42"/>
        </text:list-header>
      </text:list>
      <text:p text:style-name="P43"><draw:frame draw:style-name="fr3" draw:name="Frame15" text:anchor-type="char" svg:x="1.0346in" svg:y="0.1043in" svg:width="5.8744in" draw:z-index="24"><draw:text-box fo:min-height="3.302in"><text:p text:style-name="Figure"><draw:frame draw:style-name="fr2" draw:name="Image14" text:anchor-type="paragraph" svg:width="5.8744in" style:rel-width="100%" svg:height="3.302in" style:rel-height="scale" draw:z-index="25"><draw:image xlink:href="Pictures/100000010000055600000300A8ED6053.png" xlink:type="simple" xlink:show="embed" xlink:actuate="onLoad" draw:mime-type="image/png"/></draw:frame>Figure <text:sequence text:ref-name="refFigure13" text:name="Figure" text:formula="ooow:Figure+1" style:num-format="1">14</text:sequence>: Database Screenshot</text:p></draw:text-box></draw:frame><text:s text:c="4"/></text:p>
      <text:p text:style-name="P43"/>
      <text:p text:style-name="P43"/>
      <text:p text:style-name="P43"/>
      <text:p text:style-name="P43"/>
      <text:p text:style-name="P43"/>
      <text:p text:style-name="P43"/>
      <text:p text:style-name="P43"/>
      <text:p text:style-name="P43"/>
      <text:p text:style-name="P43"/>
      <text:p text:style-name="P43"/>
      <text:p text:style-name="P43"><draw:frame draw:style-name="fr3" draw:name="Frame16" text:anchor-type="char" svg:x="1.0598in" svg:y="0in" svg:width="6.4201in" draw:z-index="26"><draw:text-box fo:min-height="3.6091in"><text:p text:style-name="Figure"><draw:frame draw:style-name="fr2" draw:name="Image15" text:anchor-type="paragraph" svg:width="6.4201in" style:rel-width="100%" svg:height="3.6091in" style:rel-height="scale" draw:z-index="27"><draw:image xlink:href="Pictures/1000000100000556000003008DA8A03F.png" xlink:type="simple" xlink:show="embed" xlink:actuate="onLoad" draw:mime-type="image/png"/></draw:frame>Figure <text:sequence text:ref-name="refFigure14" text:name="Figure" text:formula="ooow:Figure+1" style:num-format="1">15</text:sequence>: Table Creation Screenshot</text:p></draw:text-box></draw:frame></text:p>
      <text:p text:style-name="P43"/>
      <text:p text:style-name="P43"/>
      <text:p text:style-name="P43"/>
      <text:p text:style-name="P43"/>
      <text:p text:style-name="P43"/>
      <text:p text:style-name="P43"/>
      <text:p text:style-name="P43"/>
      <text:p text:style-name="P43"/>
      <text:p text:style-name="P43"/>
      <text:p text:style-name="P43"/>
      <text:h text:style-name="Heading_20_2" text:outline-level="2"><text:bookmark-start text:name="__RefHeading___Toc1676_4282474363"/>CRUD Operations and SQL Query<text:bookmark-end text:name="__RefHeading___Toc1676_4282474363"/></text:h>
      <text:p text:style-name="P43"/>
      <text:p text:style-name="P43"><draw:frame draw:style-name="fr3" draw:name="Frame17" text:anchor-type="char" svg:x="0.4898in" svg:y="0.2083in" svg:width="6.6929in" draw:z-index="28"><draw:text-box fo:min-height="3.7626in"><text:p text:style-name="Figure"><draw:frame draw:style-name="fr2" draw:name="Image16" text:anchor-type="paragraph" svg:width="6.6929in" style:rel-width="100%" svg:height="3.7626in" style:rel-height="scale" draw:z-index="29"><draw:image xlink:href="Pictures/100000010000055600000300C13814DA.png" xlink:type="simple" xlink:show="embed" xlink:actuate="onLoad" draw:mime-type="image/png"/></draw:frame>Figure <text:sequence text:ref-name="refFigure15" text:name="Figure" text:formula="ooow:Figure+1" style:num-format="1">16</text:sequence>: Create Operation</text:p></draw:text-box></draw:frame><text:soft-page-break/></text:p>
      <text:p text:style-name="P43"><draw:frame draw:style-name="fr1" draw:name="Frame18" text:anchor-type="char" svg:width="6.6929in" draw:z-index="30"><draw:text-box fo:min-height="3.7626in"><text:p text:style-name="Figure"><draw:frame draw:style-name="fr2" draw:name="Image17" text:anchor-type="paragraph" svg:width="6.6929in" style:rel-width="100%" svg:height="3.7626in" style:rel-height="scale" draw:z-index="31"><draw:image xlink:href="Pictures/100000010000055600000300CD07FF5A.png" xlink:type="simple" xlink:show="embed" xlink:actuate="onLoad" draw:mime-type="image/png"/></draw:frame>Figure <text:sequence text:ref-name="refFigure16" text:name="Figure" text:formula="ooow:Figure+1" style:num-format="1">17</text:sequence>: Read Operation</text:p></draw:text-box></draw:frame></text:p>
      <text:p text:style-name="P44"><draw:frame draw:style-name="fr1" draw:name="Frame19" text:anchor-type="char" svg:width="6.6929in" draw:z-index="32"><draw:text-box fo:min-height="3.7626in"><text:p text:style-name="Figure"><draw:frame draw:style-name="fr2" draw:name="Image18" text:anchor-type="paragraph" svg:width="6.6929in" style:rel-width="100%" svg:height="3.7626in" style:rel-height="scale" draw:z-index="33"><draw:image xlink:href="Pictures/100000010000055600000300717602B5.png" xlink:type="simple" xlink:show="embed" xlink:actuate="onLoad" draw:mime-type="image/png"/></draw:frame>Figure <text:sequence text:ref-name="refFigure17" text:name="Figure" text:formula="ooow:Figure+1" style:num-format="1">18</text:sequence>: Update Operation</text:p></draw:text-box></draw:frame><text:soft-page-break/></text:p>
      <text:p text:style-name="P45"><draw:frame draw:style-name="fr1" draw:name="Frame20" text:anchor-type="char" svg:width="6.6929in" draw:z-index="34"><draw:text-box fo:min-height="3.7626in"><text:p text:style-name="Figure"><draw:frame draw:style-name="fr2" draw:name="Image19" text:anchor-type="paragraph" svg:width="6.6929in" style:rel-width="100%" svg:height="3.7626in" style:rel-height="scale" draw:z-index="35"><draw:image xlink:href="Pictures/100000010000055600000300FB35D823.png" xlink:type="simple" xlink:show="embed" xlink:actuate="onLoad" draw:mime-type="image/png"/></draw:frame>Figure <text:sequence text:ref-name="refFigure18" text:name="Figure" text:formula="ooow:Figure+1" style:num-format="1">19</text:sequence>: Delete Operation</text:p></draw:text-box></draw:frame></text:p>
      <text:p text:style-name="P46"><draw:frame draw:style-name="fr1" draw:name="Frame21" text:anchor-type="char" svg:width="6.6929in" draw:z-index="36"><draw:text-box fo:min-height="3.7626in"><text:p text:style-name="Figure"><draw:frame draw:style-name="fr2" draw:name="Image20" text:anchor-type="paragraph" svg:width="6.6929in" style:rel-width="100%" svg:height="3.7626in" style:rel-height="scale" draw:z-index="37"><draw:image xlink:href="Pictures/1000000100000556000003006E704E7F.png" xlink:type="simple" xlink:show="embed" xlink:actuate="onLoad" draw:mime-type="image/png"/></draw:frame>Figure <text:sequence text:ref-name="refFigure19" text:name="Figure" text:formula="ooow:Figure+1" style:num-format="1">20</text:sequence>: Login Database Integration</text:p></draw:text-box></draw:frame><text:soft-page-break/>Reflection:</text:p>
      <text:list text:continue-numbering="true" text:style-name="List_20_1">
        <text:list-item>
          <text:p text:style-name="P47"><text:span text:style-name="T15">Fig.</text:span><text:span text:style-name="T13">14</text:span><text:span text:style-name="T15">:</text:span>Shows the structural overview of the database name<text:span text:style-name="T16">d KikapuMartdb </text:span>hosted on a local MySQL server.</text:p>
        </text:list-item>
        <text:list-item>
          <text:p text:style-name="P47"><text:span text:style-name="T16">Fig.</text:span><text:span text:style-name="T7">15</text:span><text:span text:style-name="T16">:Shows</text:span> the actual rows inside th<text:span text:style-name="T16">e “Customers”</text:span> table, displaying records for users along with their contact information and creation date<text:span text:style-name="T17">s.</text:span></text:p>
        </text:list-item>
        <text:list-item>
          <text:p text:style-name="P48"><text:span text:style-name="T17">Fig.</text:span><text:span text:style-name="T7">16</text:span><text:span text:style-name="T17">:</text:span>Displays the SQL text editor executing <text:span text:style-name="T17">a “CREATE TABLE”</text:span> command to establish th<text:span text:style-name="T17">e “Customers” </text:span>schema, defining exact parameters for fields like IDs, names, unique emails, phone numbers, addresses, and automated timestamps.</text:p>
        </text:list-item>
        <text:list-item>
          <text:p text:style-name="P48"><text:span text:style-name="T17">Fig.</text:span><text:span text:style-name="T7">17</text:span><text:span text:style-name="T17">:</text:span>Displays successful execution of a retrieval query capturing a clean table output containing row parameters.</text:p>
        </text:list-item>
        <text:list-item>
          <text:p text:style-name="P48"><text:span text:style-name="T17">Fig.</text:span><text:span text:style-name="T7">18</text:span><text:span text:style-name="T17">:</text:span>Shows an data-modification query altering customer data fields for a specific record </text:p>
        </text:list-item>
        <text:list-item>
          <text:p text:style-name="P48"><text:span text:style-name="T17">Fig.</text:span><text:span text:style-name="T7">19:</text:span>Highlights a specific data removal query inside the SQL editor to target and drop records safely from the system.</text:p>
        </text:list-item>
        <text:list-item>
          <text:p text:style-name="P48"><text:span text:style-name="T17">Fig.</text:span><text:span text:style-name="T7">20</text:span><text:span text:style-name="T17">:</text:span>Shows the fundamental frontend landing componen<text:span text:style-name="T17">t </text:span>under the local project path. It provides basic text input elements for usernames and passwords that directly tie into backend SQL search lookups for live production testing.</text:p>
        </text:list-item>
      </text:list>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0T17:35:50.754439280</meta:creation-date>
    <dc:date>2026-06-04T12:28:38.912353917</dc:date>
    <meta:editing-duration>PT4H30M5S</meta:editing-duration>
    <meta:editing-cycles>19</meta:editing-cycles>
    <meta:generator>LibreOffice/25.2.3.2$Linux_X86_64 LibreOffice_project/520$Build-2</meta:generator>
    <meta:document-statistic meta:table-count="0" meta:image-count="20" meta:object-count="0" meta:page-count="15" meta:paragraph-count="104" meta:word-count="935" meta:character-count="6294" meta:non-whitespace-character-count="5452"/>
  </office:meta>
</office:document-meta>
</file>